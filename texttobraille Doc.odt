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D8D000008C84EA99168.jpg" manifest:media-type="image/jpeg"/>
  <manifest:file-entry manifest:full-path="Pictures/10000001000004C3000002C5A8D2F1AA.png" manifest:media-type="image/png"/>
  <manifest:file-entry manifest:full-path="Pictures/1000000000000780000004386387AC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dec32" officeooo:paragraph-rsid="001dec32" style:font-size-asian="17.5pt" style:font-size-complex="20pt"/>
    </style:style>
    <style:style style:name="P2" style:family="paragraph" style:parent-style-name="Standard">
      <style:paragraph-properties fo:text-align="start" style:justify-single-word="false"/>
      <style:text-properties fo:font-size="20pt" officeooo:rsid="001dec32" officeooo:paragraph-rsid="001dec32" style:font-size-asian="17.5pt" style:font-size-complex="20pt"/>
    </style:style>
    <style:style style:name="P3" style:family="paragraph" style:parent-style-name="Standard">
      <style:paragraph-properties fo:text-align="center" style:justify-single-word="false"/>
      <style:text-properties fo:font-size="20pt" officeooo:rsid="002b351e" officeooo:paragraph-rsid="002b351e" style:font-size-asian="17.5pt" style:font-size-complex="20pt"/>
    </style:style>
    <style:style style:name="P4" style:family="paragraph" style:parent-style-name="Standard">
      <style:paragraph-properties fo:text-align="start" style:justify-single-word="false"/>
      <style:text-properties fo:font-size="14pt" officeooo:rsid="001dec32" officeooo:paragraph-rsid="001dec32" style:font-size-asian="12.25pt" style:font-size-complex="14pt"/>
    </style:style>
    <style:style style:name="P5" style:family="paragraph" style:parent-style-name="Standard">
      <style:paragraph-properties fo:text-align="start" style:justify-single-word="false"/>
      <style:text-properties fo:font-size="14pt" officeooo:rsid="002378e1" officeooo:paragraph-rsid="002378e1" style:font-size-asian="12.25pt" style:font-size-complex="14pt"/>
    </style:style>
    <style:style style:name="P6" style:family="paragraph" style:parent-style-name="Standard">
      <style:paragraph-properties fo:text-align="start" style:justify-single-word="false"/>
      <style:text-properties fo:font-size="14pt" officeooo:rsid="0029bb00" officeooo:paragraph-rsid="002378e1" style:font-size-asian="12.25pt" style:font-size-complex="14pt"/>
    </style:style>
    <style:style style:name="P7" style:family="paragraph" style:parent-style-name="Standard">
      <style:paragraph-properties fo:text-align="start" style:justify-single-word="false"/>
      <style:text-properties fo:font-size="14pt" officeooo:rsid="002b92c7" officeooo:paragraph-rsid="002b92c7" style:font-size-asian="12.25pt" style:font-size-complex="14pt"/>
    </style:style>
    <style:style style:name="P8" style:family="paragraph" style:parent-style-name="Text_20_body">
      <style:paragraph-properties fo:text-align="start" style:justify-single-word="false"/>
      <style:text-properties fo:font-size="14pt" officeooo:rsid="002b92c7" officeooo:paragraph-rsid="002b92c7" style:font-size-asian="12.25pt" style:font-size-complex="14pt"/>
    </style:style>
    <style:style style:name="P9" style:family="paragraph" style:parent-style-name="Heading_20_2">
      <style:paragraph-properties fo:text-align="start" style:justify-single-word="false"/>
      <style:text-properties fo:font-size="14pt" officeooo:rsid="002fe1f2" officeooo:paragraph-rsid="002fe1f2" style:font-size-asian="12.25pt" style:font-size-complex="14pt"/>
    </style:style>
    <style:style style:name="P10" style:family="paragraph" style:parent-style-name="Standard">
      <style:paragraph-properties fo:text-align="start" style:justify-single-word="false"/>
      <style:text-properties fo:font-size="14pt" officeooo:rsid="002fe1f2" officeooo:paragraph-rsid="002fe1f2" style:font-size-asian="12.25pt" style:font-size-complex="14pt"/>
    </style:style>
    <style:style style:name="P11" style:family="paragraph" style:parent-style-name="Text_20_body">
      <style:paragraph-properties fo:text-align="start" style:justify-single-word="false"/>
      <style:text-properties fo:font-size="14pt" officeooo:rsid="002fe1f2" officeooo:paragraph-rsid="002fe1f2" style:font-size-asian="12.25pt" style:font-size-complex="14pt"/>
    </style:style>
    <style:style style:name="P12" style:family="paragraph" style:parent-style-name="Standard">
      <style:paragraph-properties fo:text-align="start" style:justify-single-word="false"/>
      <style:text-properties fo:font-size="14pt" officeooo:rsid="001ecc22" officeooo:paragraph-rsid="001ecc22" style:font-size-asian="12.25pt" style:font-size-complex="14pt"/>
    </style:style>
    <style:style style:name="P13" style:family="paragraph" style:parent-style-name="Standard">
      <style:paragraph-properties fo:text-align="start" style:justify-single-word="false"/>
      <style:text-properties fo:font-size="14pt" officeooo:rsid="00312459" officeooo:paragraph-rsid="00312459" style:font-size-asian="12.25pt" style:font-size-complex="14pt"/>
    </style:style>
    <style:style style:name="P14" style:family="paragraph" style:parent-style-name="Standard">
      <style:paragraph-properties fo:text-align="start" style:justify-single-word="false"/>
      <style:text-properties fo:font-size="14pt" officeooo:rsid="00322ae7" officeooo:paragraph-rsid="00322ae7" style:font-size-asian="12.25pt" style:font-size-complex="14pt"/>
    </style:style>
    <style:style style:name="P15" style:family="paragraph" style:parent-style-name="Standard">
      <style:paragraph-properties fo:text-align="start" style:justify-single-word="false"/>
      <style:text-properties fo:font-size="14pt" officeooo:rsid="0032b1ef" officeooo:paragraph-rsid="0032b1ef" style:font-size-asian="12.25pt" style:font-size-complex="14pt"/>
    </style:style>
    <style:style style:name="P16" style:family="paragraph" style:parent-style-name="Standard">
      <style:paragraph-properties fo:text-align="start" style:justify-single-word="false"/>
      <style:text-properties fo:font-size="13pt" officeooo:rsid="001dec32" officeooo:paragraph-rsid="001dec32" style:font-size-asian="11.3500003814697pt" style:font-size-complex="13pt"/>
    </style:style>
    <style:style style:name="P17" style:family="paragraph" style:parent-style-name="Text_20_body" style:list-style-name="L1"/>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style style:name="P20" style:family="paragraph" style:parent-style-name="Text_20_body" style:list-style-name="L2">
      <style:paragraph-properties fo:margin-top="0cm" fo:margin-bottom="0cm" style:contextual-spacing="false"/>
    </style:style>
    <style:style style:name="P21" style:family="paragraph">
      <loext:graphic-properties draw:fill="none" draw:fill-color="#ffffff"/>
    </style:style>
    <style:style style:name="P22" style:family="paragraph">
      <style:paragraph-properties style:writing-mode="lr-tb"/>
    </style:style>
    <style:style style:name="T1" style:family="text">
      <style:text-properties fo:font-size="20pt" style:font-size-asian="20pt" style:font-size-complex="20pt"/>
    </style:style>
    <style:style style:name="T2" style:family="text">
      <style:text-properties officeooo:rsid="002378e1"/>
    </style:style>
    <style:style style:name="T3" style:family="text">
      <style:text-properties officeooo:rsid="002b92c7"/>
    </style:style>
    <style:style style:name="T4" style:family="text">
      <style:text-properties officeooo:rsid="002d6033"/>
    </style:style>
    <style:style style:name="T5" style:family="text">
      <style:text-properties officeooo:rsid="003261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85cm, 4.494cm, 0cm, 8.88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928cm, 0cm, 0.767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6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263cm" fo:min-width="2.0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392cm" fo:min-width="2.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762cm" fo:min-width="1.76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2.201cm" fo:min-width="3.8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ext</text:span> to Braille</text:p>
      <text:p text:style-name="P3"><text:s/></text:p>
      <text:p text:style-name="P3"/>
      <text:p text:style-name="P2">Aim:</text:p>
      <text:p text:style-name="P16">To get <text:span text:style-name="T4">text</text:span> input from user and convert that <text:span text:style-name="T4">text</text:span> into braille virbations using coin motor<text:span text:style-name="T4">s</text:span> grid of 3x<text:span text:style-name="T4">1</text:span>.</text:p>
      <text:p text:style-name="P16"/>
      <text:p text:style-name="P16"/>
      <text:p text:style-name="P4"><text:span text:style-name="T1">components</text:span>:</text:p>
      <text:p text:style-name="P4">Esp32(1),</text:p>
      <text:p text:style-name="P4">coin motors/vibrating motors(<text:span text:style-name="T4">3</text:span>),</text:p>
      <text:p text:style-name="P4">flyback diodes <text:span text:style-name="T2">(</text:span><text:span text:style-name="T4">3</text:span><text:span text:style-name="T2">)</text:span></text:p>
      <text:p text:style-name="P4">inbuilt laptop <text:span text:style-name="T4">Keyboard.</text:span></text:p>
      <text:p text:style-name="P4"/>
      <text:p text:style-name="P4"/>
      <text:p text:style-name="P12">Circuit Diagram:</text:p>
      <text:p text:style-name="P13"><text:span text:style-name="T5">overall connections</text:span>:</text:p>
      <text:p text:style-name="P15">(initial attempt)</text:p>
      <text:p text:style-name="P13"><draw:frame draw:style-name="fr3" draw:name="Image1" text:anchor-type="char" svg:x="0.085cm" svg:y="0.377cm" svg:width="17cm" svg:height="7.179cm" draw:z-index="0"><draw:image xlink:href="Pictures/1000000000000780000004386387AC50.png" xlink:type="simple" xlink:show="embed" xlink:actuate="onLoad" draw:mime-type="image/png"/></draw:frame></text:p>
      <text:p text:style-name="P14"><text:span text:style-name="T5">single </text:span>motor connectio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3" text:anchor-type="char" svg:width="17cm" svg:height="9.887cm" draw:z-index="10"><draw:image xlink:href="Pictures/10000001000004C3000002C5A8D2F1AA.png" xlink:type="simple" xlink:show="embed" xlink:actuate="onLoad" draw:mime-type="image/png"/></draw:frame><text:soft-page-break/></text:p>
      <text:p text:style-name="P13"/>
      <text:p text:style-name="P13"/>
      <text:p text:style-name="P5">Flow chart:</text:p>
      <text:p text:style-name="P5"><draw:custom-shape text:anchor-type="paragraph" draw:z-index="1" draw:name="Shape 1" draw:style-name="gr7" svg:width="3.895cm" svg:height="2.202cm" svg:x="0.288cm" svg:y="0.333cm"><text:p/><draw:enhanced-geometry svg:viewBox="0 0 21600 21600" draw:type="rectangle" draw:enhanced-path="M 0 0 L 21600 0 21600 21600 0 21600 0 0 Z N"/></draw:custom-shape><draw:custom-shape text:anchor-type="paragraph" draw:z-index="2" draw:name="Shape 2" draw:style-name="gr6" draw:text-style-name="P22" svg:width="1.763cm" svg:height="1.763cm" svg:x="5.57cm" svg:y="0.552cm"><text:p/><draw:enhanced-geometry svg:viewBox="0 0 21600 21600" draw:type="rectangle" draw:enhanced-path="M 0 0 L 21600 0 21600 21600 0 21600 0 0 Z N"/></draw:custom-shape><draw:custom-shape text:anchor-type="paragraph" draw:z-index="3" draw:name="Shape 3" draw:style-name="gr6" draw:text-style-name="P22" svg:width="1.763cm" svg:height="1.763cm" svg:x="9.278cm" svg:y="0.519cm"><text:p/><draw:enhanced-geometry svg:viewBox="0 0 21600 21600" draw:type="rectangle" draw:enhanced-path="M 0 0 L 21600 0 21600 21600 0 21600 0 0 Z N"/></draw:custom-shape><draw:frame text:anchor-type="paragraph" draw:z-index="8" draw:name="Text Frame 3" draw:style-name="gr1" draw:text-style-name="P21" svg:width="4.268cm" svg:height="1.763cm" svg:x="11.109cm" svg:y="0.418cm"><draw:text-box><text:p>3x1 Grid of coin motors </text:p><text:p>Here braile vibrations are felt </text:p></draw:text-box></draw:frame></text:p>
      <text:p text:style-name="P5"><draw:custom-shape text:anchor-type="paragraph" draw:z-index="4" draw:name="Shape 4" draw:style-name="gr5" svg:width="2.32cm" svg:height="0.78cm" svg:x="4.03cm" svg:y="0.3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name="Text Frame 1" draw:style-name="gr3" draw:text-style-name="P21" svg:width="3.423cm" svg:height="1.627cm" svg:x="0.49cm" svg:y="0.086cm"><draw:text-box><text:p>Text input on</text:p><text:p>Laptop</text:p></draw:text-box></draw:frame></text:p>
      <text:p text:style-name="P5"><draw:custom-shape text:anchor-type="paragraph" draw:z-index="5" draw:name="Shape 5" draw:style-name="gr4" svg:width="2.387cm" svg:height="0.525cm" svg:x="7.332cm" svg:y="0.12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draw:frame text:anchor-type="paragraph" draw:z-index="7" draw:name="Text Frame 2" draw:style-name="gr2" draw:text-style-name="P21" svg:width="4.268cm" svg:height="1.95cm" svg:x="4.978cm" svg:y="0.228cm"><draw:text-box><text:p>Esp32 </text:p><text:p>Converts</text:p><text:p>Letters into respective Grid vibrations </text:p></draw:text-box></draw:frame></text:p>
      <text:p text:style-name="P5"/>
      <text:p text:style-name="P5"/>
      <text:p text:style-name="P5"/>
      <text:p text:style-name="P5">Input (Keyboard) → ESP32 Microcontroller → Motor Driver Circuit → Coin Vibrating Motors (3x1 Grid) → Braille Output (Vibration Pattern)</text:p>
      <text:p text:style-name="P5"/>
      <text:p text:style-name="P10">working/operation:</text:p>
      <text:p text:style-name="P11">The system takes text input from the user through a laptop keyboard. The ESP32 processes this input and converts each character into its corresponding Braille representation. Each Braille character is mapped to a specific vibration pattern using a 3x1 grid of coin motors.</text:p>
      <text:p text:style-name="Text_20_body">When a character is entered, the ESP32 activates specific motors based on the Braille encoding. The motors vibrate in patterns that represent raised dots in Braille, allowing the user to feel and interpret the text.</text:p>
      <text:p text:style-name="Text_20_body">Each component works as follows:</text:p>
      <text:list text:style-name="L1">
        <text:list-item>
          <text:p text:style-name="P18"><text:span text:style-name="Strong_20_Emphasis">ESP32</text:span>: Processes input and controls output </text:p>
        </text:list-item>
        <text:list-item>
          <text:p text:style-name="P18"><text:span text:style-name="Strong_20_Emphasis">Coin Motors</text:span>: Generate vibrations representing Braille dots </text:p>
        </text:list-item>
        <text:list-item>
          <text:p text:style-name="P18"><text:soft-page-break/><text:span text:style-name="Strong_20_Emphasis">Flyback Diodes</text:span>: Protect the circuit from voltage spikes </text:p>
        </text:list-item>
        <text:list-item>
          <text:p text:style-name="P17"><text:span text:style-name="Strong_20_Emphasis">Keyboard</text:span>: Provides user input</text:p>
        </text:list-item>
      </text:list>
      <text:h text:style-name="P9" text:outline-level="2"><text:span text:style-name="Strong_20_Emphasis">Hardware Setup:</text:span></text:h>
      <text:list text:style-name="L2">
        <text:list-item>
          <text:p text:style-name="P20">ESP32 board placed on breadboard </text:p>
        </text:list-item>
        <text:list-item>
          <text:p text:style-name="P20">3 coin motors arranged in a 3x1 grid </text:p>
        </text:list-item>
        <text:list-item>
          <text:p text:style-name="P20">Each motor labeled as Dot 1, Dot 2, Dot 3 </text:p>
        </text:list-item>
        <text:list-item>
          <text:p text:style-name="P20">Flyback diodes connected parallel to each motor </text:p>
        </text:list-item>
        <text:list-item>
          <text:p text:style-name="P20">Wires properly color-coded (VCC, GND, Signal) </text:p>
        </text:list-item>
        <text:list-item>
          <text:p text:style-name="P19">USB cable used for power and programming</text:p>
        </text:list-item>
      </text:list>
      <text:p text:style-name="P10"/>
      <text:p text:style-name="P7">Application of the Project :</text:p>
      <text:p text:style-name="P8">The ESP32-based text-to-Braille project is a highly useful assistive technology designed to help visually impaired individuals access written information independently. By converting digital text into tactile Braille output, it enables users to read messages, documents, and educational content without relying on audio aids. The system can also support real-time text conversion through wireless communication features like Bluetooth or Wi-Fi, making it suitable for modern applications such as smartphones and smart devices. Additionally, it serves as an effective educational tool for learning Braille and offers a low-cost alternative to expensive commercial Braille displays. Overall, this project enhances accessibility, promotes independence, and improves the quality of life for users with visual impairments.</text:p>
      <text:p text:style-name="P8"/>
      <text:p text:style-name="P8">Project image:</text:p>
      <text:p text:style-name="P8"><draw:frame draw:style-name="fr2" draw:name="Image2" text:anchor-type="char" svg:x="-0.637cm" svg:y="-0.161cm" svg:width="13.903cm" svg:height="7.578cm" draw:z-index="9"><draw:image xlink:href="Pictures/1000000000000D8D000008C84EA99168.jpg" xlink:type="simple" xlink:show="embed" xlink:actuate="onLoad" draw:mime-type="image/jpeg"/></draw:frame></text:p>
      <text:p text:style-name="P7"/>
      <text:p text:style-name="P5"/>
      <text:p text:style-name="P5"/>
      <text:p text:style-name="P5"/>
      <text:p text:style-name="P5"/>
      <text:p text:style-name="P5"/>
      <text:p text:style-name="P5"/>
      <text:p text:style-name="P5"/>
      <text:p text:style-name="P5"/>
      <text:p text:style-name="P5"/>
      <text:p text:style-name="P5"/>
      <text:p text:style-name="P6"/>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6T11:15:12.052172540</meta:creation-date>
    <dc:date>2026-05-02T09:18:23.021791616</dc:date>
    <meta:editing-duration>PT1H2M19S</meta:editing-duration>
    <meta:editing-cycles>19</meta:editing-cycles>
    <meta:generator>LibreOffice/24.2.7.2$Linux_X86_64 LibreOffice_project/420$Build-2</meta:generator>
    <meta:print-date>2026-05-01T18:30:26.017152944</meta:print-date>
    <meta:printed-by>PDF files</meta:printed-by>
    <meta:document-statistic meta:table-count="0" meta:image-count="3" meta:object-count="0" meta:page-count="4" meta:paragraph-count="33" meta:word-count="346" meta:character-count="2295" meta:non-whitespace-character-count="1982"/>
  </office:meta>
</office:document-meta>
</file>